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4.496cm"/>
    </style:style>
    <style:style style:name="co4" style:family="table-column">
      <style:table-column-properties fo:break-before="auto" style:column-width="20.2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0cecd7" style:text-align-source="fix" style:repeat-content="false" fo:border="0.74pt solid #000000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000000"/>
    </style:style>
    <style:style style:name="ce5" style:family="table-cell" style:parent-style-name="Default">
      <style:table-cell-properties fo:background-color="#ff860d" fo:border="0.74pt solid #000000"/>
      <style:text-properties fo:color="#000000"/>
    </style:style>
    <style:style style:name="ce6" style:family="table-cell" style:parent-style-name="Default">
      <style:table-cell-properties fo:background-color="#f10d0c" fo:border="0.74pt solid #000000"/>
      <style:text-properties fo:color="#000000"/>
    </style:style>
    <style:style style:name="ce7" style:family="table-cell" style:parent-style-name="Default">
      <style:table-cell-properties fo:background-color="#8d1d75" fo:border="0.74pt solid #000000"/>
      <style:text-properties fo:color="#000000"/>
    </style:style>
    <style:style style:name="ce8" style:family="table-cell" style:parent-style-name="Default">
      <style:table-cell-properties fo:background-color="#b47804" fo:border="0.74pt solid #000000"/>
      <style:text-properties fo:color="#000000"/>
    </style:style>
    <style:style style:name="ce9" style:family="table-cell" style:parent-style-name="Default">
      <style:table-cell-properties fo:background-color="#069a2e" style:text-align-source="fix" style:repeat-content="false" fo:border="0.74pt solid #000000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a1467e" fo:border="0.74pt solid #000000"/>
      <style:text-properties fo:color="#000000"/>
    </style:style>
    <style:style style:name="ce11" style:family="table-cell" style:parent-style-name="Default">
      <style:table-cell-properties fo:background-color="#e8f2a1" fo:border="0.74pt solid #000000"/>
      <style:text-properties fo:color="#000000"/>
    </style:style>
    <style:style style:name="ce12" style:family="table-cell" style:parent-style-name="Default">
      <style:table-cell-properties fo:background-color="#ffff38" fo:border="0.74pt solid #000000"/>
      <style:text-properties fo:color="#000000"/>
    </style:style>
    <style:style style:name="ce13" style:family="table-cell" style:parent-style-name="Default">
      <style:table-cell-properties fo:background-color="#e6e905" fo:border="0.74pt solid #000000"/>
      <style:text-properties fo:color="#000000"/>
    </style:style>
    <style:style style:name="ce14" style:family="table-cell" style:parent-style-name="Default">
      <style:table-cell-properties fo:background-color="#f904cd" fo:border="0.74pt solid #000000"/>
      <style:text-properties fo:color="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3465a4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f3838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bbe33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08080" fo:border="0.74pt solid #000000"/>
      <style:text-properties fo:color="#000000"/>
    </style:style>
    <style:style style:name="ce2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/>
    </style:style>
    <style:style style:name="ce25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fo:background-color="#cf0aab" style:text-align-source="fix" style:repeat-content="false" fo:border="0.74pt solid #000000"/>
      <style:paragraph-properties fo:text-align="start" fo:margin-left="0cm"/>
      <style:text-properties fo:color="#000000"/>
    </style:style>
    <style:style style:name="ce28" style:family="table-cell" style:parent-style-name="Default">
      <style:table-cell-properties fo:background-color="#1785fa" style:text-align-source="fix" style:repeat-content="false" fo:border="0.74pt solid #000000"/>
      <style:paragraph-properties fo:text-align="start" fo:margin-left="0cm"/>
      <style:text-properties fo:color="#000000"/>
    </style:style>
    <style:style style:name="ce29" style:family="table-cell" style:parent-style-name="Default">
      <style:table-cell-properties fo:background-color="#ffd428" style:text-align-source="fix" style:repeat-content="false" fo:border="0.74pt solid #000000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c9211e" style:text-align-source="fix" style:repeat-content="false" fo:border="0.74pt solid #000000"/>
      <style:paragraph-properties fo:text-align="start" fo:margin-left="0cm"/>
      <style:text-properties fo:color="#000000"/>
    </style:style>
    <style:style style:name="ce31" style:family="table-cell" style:parent-style-name="Default">
      <style:table-cell-properties fo:background-color="#f10d0c" style:text-align-source="fix" style:repeat-content="false" fo:wrap-option="wrap" fo:border="0.74pt solid #000000"/>
      <style:paragraph-properties fo:text-align="start" fo:margin-left="0cm"/>
      <style:text-properties fo:color="#000000"/>
    </style:style>
    <style:style style:name="ce32" style:family="table-cell" style:parent-style-name="Default">
      <style:table-cell-properties fo:background-color="#ff3838" style:text-align-source="fix" style:repeat-content="false" fo:wrap-option="wrap" fo:border="0.74pt solid #000000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e994" style:text-align-source="fix" style:repeat-content="false" fo:wrap-option="wrap" fo:border="0.74pt solid #000000"/>
      <style:paragraph-properties fo:text-align="start" fo:margin-left="0cm"/>
      <style:text-properties fo:color="#000000"/>
    </style:style>
    <style:style style:name="ce34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start" fo:margin-left="0cm"/>
      <style:text-properties fo:color="#000000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start" fo:margin-left="0cm"/>
      <style:text-properties fo:color="#000000"/>
    </style:style>
    <style:style style:name="ce36" style:family="table-cell" style:parent-style-name="Default">
      <style:table-cell-properties fo:background-color="#800080" style:text-align-source="fix" style:repeat-content="false" fo:border="0.74pt solid #000000"/>
      <style:paragraph-properties fo:text-align="start" fo:margin-left="0cm"/>
      <style:text-properties fo:color="#000000"/>
    </style:style>
    <style:style style:name="ce37" style:family="table-cell" style:parent-style-name="Default">
      <style:table-cell-properties fo:background-color="#ff972f" style:text-align-source="fix" style:repeat-content="false" fo:border="0.74pt solid #000000"/>
      <style:paragraph-properties fo:text-align="start" fo:margin-left="0cm"/>
      <style:text-properties fo:color="#000000"/>
    </style:style>
    <style:style style:name="ce38" style:family="table-cell" style:parent-style-name="Default">
      <style:table-cell-properties fo:background-color="#ff5429" style:text-align-source="fix" style:repeat-content="false" fo:border="0.74pt solid #000000"/>
      <style:paragraph-properties fo:text-align="start" fo:margin-left="0cm"/>
      <style:text-properties fo:color="#000000"/>
    </style:style>
    <style:style style:name="ce39" style:family="table-cell" style:parent-style-name="Default">
      <style:table-cell-properties fo:background-color="#ffe994" style:text-align-source="fix" style:repeat-content="false" fo:border="0.74pt solid #000000"/>
      <style:paragraph-properties fo:text-align="start" fo:margin-left="0cm"/>
      <style:text-properties fo:color="#000000"/>
    </style:style>
    <style:style style:name="ce40" style:family="table-cell" style:parent-style-name="Default">
      <style:table-cell-properties fo:background-color="#e6e905" style:text-align-source="fix" style:repeat-content="false" fo:border="0.74pt solid #000000"/>
      <style:paragraph-properties fo:text-align="start" fo:margin-left="0cm"/>
      <style:text-properties fo:color="#000000"/>
    </style:style>
    <style:style style:name="ce41" style:family="table-cell" style:parent-style-name="Default">
      <style:table-cell-properties fo:background-color="#e8a202" style:text-align-source="fix" style:repeat-content="false" fo:border="0.74pt solid #000000"/>
      <style:paragraph-properties fo:text-align="start" fo:margin-left="0cm"/>
      <style:text-properties fo:color="#000000"/>
    </style:style>
    <style:style style:name="ce42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cm"/>
      <style:text-properties fo:color="#000000"/>
    </style:style>
    <style:style style:name="ce43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diagonal-bl-tr="0.06pt solid #000000" style:diagonal-tl-br="0.06pt solid #000000" fo:border="0.74pt solid #2a6099"/>
    </style:style>
    <style:style style:name="ce45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diagonal-bl-tr="0.06pt solid #000000" style:diagonal-tl-br="0.06pt solid #000000" fo:border="0.74pt solid #000000"/>
    </style:style>
    <style:style style:name="ce47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" table:default-cell-style-name="ce15"/>
        <table:table-column table:style-name="co3" table:number-columns-repeated="4" table:default-cell-style-name="ce15"/>
        <table:table-column table:style-name="co1" table:default-cell-style-name="ce15"/>
        <table:table-column table:style-name="co2" table:number-columns-repeated="3" table:default-cell-style-name="ce15"/>
        <table:table-column table:style-name="co4" table:default-cell-style-name="ce15"/>
        <table:table-row table:style-name="ro1">
          <table:table-cell table:style-name="ce1" office:value-type="string" calcext:value-type="string" table:number-columns-spanned="1" table:number-rows-spanned="3">
            <text:p>FLASH</text:p>
          </table:table-cell>
          <table:table-cell table:style-name="ce16" office:value-type="string" calcext:value-type="string" table:number-columns-spanned="1" table:number-rows-spanned="3">
            <text:p>PRIX FLASH FR</text:p>
          </table:table-cell>
          <table:table-cell table:style-name="ce17" office:value-type="string" calcext:value-type="string" table:number-columns-spanned="1" table:number-rows-spanned="3">
            <text:p>PRIX FLASH ES</text:p>
          </table:table-cell>
          <table:table-cell table:style-name="ce18" office:value-type="string" calcext:value-type="string" table:number-columns-spanned="1" table:number-rows-spanned="3">
            <text:p>PRIX DE VENTES FR x2,5</text:p>
          </table:table-cell>
          <table:table-cell table:style-name="ce19" office:value-type="string" calcext:value-type="string" table:number-columns-spanned="1" table:number-rows-spanned="3">
            <text:p>PRIX DE VENTE ES x3</text:p>
          </table:table-cell>
          <table:table-cell table:style-name="ce20" office:value-type="string" calcext:value-type="string" table:number-columns-spanned="1" table:number-rows-spanned="3">
            <text:p>BENEFICES NET FR</text:p>
          </table:table-cell>
          <table:table-cell table:style-name="ce21" office:value-type="string" calcext:value-type="string" table:number-columns-spanned="1" table:number-rows-spanned="3">
            <text:p>BENEFICES NET ES</text:p>
          </table:table-cell>
          <table:table-cell table:style-name="ce22" office:value-type="string" calcext:value-type="string" table:number-columns-spanned="1" table:number-rows-spanned="3">
            <text:p>PRODUITS</text:p>
          </table:table-cell>
          <table:table-cell table:style-name="ce43" office:value-type="string" calcext:value-type="string" table:number-columns-spanned="1" table:number-rows-spanned="3">
            <text:p>PRIX AU CL</text:p>
          </table:table-cell>
          <table:table-cell table:style-name="ce45" office:value-type="string" calcext:value-type="string" table:number-columns-spanned="1" table:number-rows-spanned="3">
            <text:p>PRIX AU L</text:p>
          </table:table-cell>
          <table:table-cell table:style-name="ce47" office:value-type="string" calcext:value-type="string" table:number-columns-spanned="1" table:number-rows-spanned="3">
            <text:p>FOURNISSEUR</text:p>
          </table:table-cell>
          <table:table-cell table:style-name="ce48" office:value-type="string" calcext:value-type="string" table:number-columns-spanned="1" table:number-rows-spanned="3">
            <text:p>LIEN PRODUIT</text:p>
          </table:table-cell>
        </table:table-row>
        <table:table-row table:style-name="ro1">
          <table:covered-table-cell table:number-columns-repeated="9" table:style-name="Default"/>
          <table:covered-table-cell/>
          <table:covered-table-cell table:number-columns-repeated="2" table:style-name="Default"/>
        </table:table-row>
        <table:table-row table:style-name="ro1">
          <table:covered-table-cell table:number-columns-repeated="9" table:style-name="ce2"/>
          <table:covered-table-cell/>
          <table:covered-table-cell table:number-columns-repeated="2" table:style-name="Default"/>
        </table:table-row>
        <table:table-row table:style-name="ro1">
          <table:table-cell table:style-name="ce3" office:value-type="string" calcext:value-type="string">
            <text:p>BLUE-LAGOON</text:p>
          </table:table-cell>
          <table:table-cell table:formula="of:=SUM([.I4]+10*[.I5]+35*[.I9]+5*[.I14])" office:value-type="float" office:value="3.0045" calcext:value-type="float">
            <text:p>3,0045</text:p>
          </table:table-cell>
          <table:table-cell table:formula="of:=SUM([.I4]+10*[.I6]+35*[.I9]+5*[.I14])" office:value-type="float" office:value="2.2115" calcext:value-type="float">
            <text:p>2,2115</text:p>
          </table:table-cell>
          <table:table-cell table:formula="of:=SUM([.B4]*2.5)" office:value-type="float" office:value="7.51125" calcext:value-type="float">
            <text:p>7,51125</text:p>
          </table:table-cell>
          <table:table-cell table:formula="of:=SUM([.C4]*3)" office:value-type="float" office:value="6.6345" calcext:value-type="float">
            <text:p>6,6345</text:p>
          </table:table-cell>
          <table:table-cell table:formula="of:=SUM([.D4]-[.B4])" office:value-type="float" office:value="4.50675" calcext:value-type="float">
            <text:p>4,50675</text:p>
          </table:table-cell>
          <table:table-cell table:formula="of:=SUM([.E4]-[.C4])" office:value-type="float" office:value="4.423" calcext:value-type="float">
            <text:p>4,423</text:p>
          </table:table-cell>
          <table:table-cell table:style-name="ce23" office:value-type="string" calcext:value-type="string">
            <text:p>BOUTEILLE 50CL ( PRIX UNITE )</text:p>
          </table:table-cell>
          <table:table-cell office:value-type="float" office:value="0.55" calcext:value-type="float">
            <text:p>0,55</text:p>
          </table:table-cell>
          <table:table-cell table:style-name="ce46"/>
          <table:table-cell office:value-type="string" calcext:value-type="string">
            <text:p>SITE INTERNET</text:p>
          </table:table-cell>
          <table:table-cell office:value-type="string" calcext:value-type="string">
            <text:p>https://www.tacerisesurlegateau.com/panier?action=show</text:p>
          </table:table-cell>
        </table:table-row>
        <table:table-row table:style-name="ro1">
          <table:table-cell table:style-name="ce4" office:value-type="string" calcext:value-type="string">
            <text:p>SEXY-BEACH</text:p>
          </table:table-cell>
          <table:table-cell table:formula="of:=SUM([.I4]+10*[.I5]+5*[.I12]+15*[.I20]+20*[.I19])" office:value-type="float" office:value="2.785" calcext:value-type="float">
            <text:p>2,785</text:p>
          </table:table-cell>
          <table:table-cell table:formula="of:=SUM([.I4]+10*[.I6]+5*[.I12]+15*[.I20]+20*[.I19])" office:value-type="float" office:value="1.992" calcext:value-type="float">
            <text:p>1,992</text:p>
          </table:table-cell>
          <table:table-cell table:formula="of:=SUM([.B5]*2.5)" office:value-type="float" office:value="6.9625" calcext:value-type="float">
            <text:p>6,9625</text:p>
          </table:table-cell>
          <table:table-cell table:formula="of:=SUM([.C5]*3)" office:value-type="float" office:value="5.976" calcext:value-type="float">
            <text:p>5,976</text:p>
          </table:table-cell>
          <table:table-cell table:formula="of:=SUM([.D5]-[.B5])" office:value-type="float" office:value="4.1775" calcext:value-type="float">
            <text:p>4,1775</text:p>
          </table:table-cell>
          <table:table-cell table:formula="of:=SUM([.E5]-[.C5])" office:value-type="float" office:value="3.984" calcext:value-type="float">
            <text:p>3,984</text:p>
          </table:table-cell>
          <table:table-cell table:style-name="ce24" office:value-type="string" calcext:value-type="string">
            <text:p>VDK FR</text:p>
          </table:table-cell>
          <table:table-cell table:formula="of:=SUM([.J5]/100)" office:value-type="float" office:value="0.1569" calcext:value-type="float">
            <text:p>0,1569</text:p>
          </table:table-cell>
          <table:table-cell office:value-type="float" office:value="15.69" calcext:value-type="float">
            <text:p>15,69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5" office:value-type="string" calcext:value-type="string">
            <text:p>FRAMBI-FRUITI</text:p>
          </table:table-cell>
          <table:table-cell table:formula="of:=SUM([.I4]+10*[.I5]+5*[.I13]+35*[.I24])" office:value-type="float" office:value="2.724" calcext:value-type="float">
            <text:p>2,724</text:p>
          </table:table-cell>
          <table:table-cell table:formula="of:=SUM([.I4]+10*[.I6]+5*[.I13]+35*[.I24])" office:value-type="float" office:value="1.931" calcext:value-type="float">
            <text:p>1,931</text:p>
          </table:table-cell>
          <table:table-cell table:formula="of:=SUM([.B6]*2.5)" office:value-type="float" office:value="6.81" calcext:value-type="float">
            <text:p>6,81</text:p>
          </table:table-cell>
          <table:table-cell table:formula="of:=SUM([.C6]*3)" office:value-type="float" office:value="5.793" calcext:value-type="float">
            <text:p>5,793</text:p>
          </table:table-cell>
          <table:table-cell table:formula="of:=SUM([.D6]-[.B6])" office:value-type="float" office:value="4.086" calcext:value-type="float">
            <text:p>4,086</text:p>
          </table:table-cell>
          <table:table-cell table:formula="of:=SUM([.E6]-[.C6])" office:value-type="float" office:value="3.862" calcext:value-type="float">
            <text:p>3,862</text:p>
          </table:table-cell>
          <table:table-cell table:style-name="ce25" office:value-type="string" calcext:value-type="string">
            <text:p>VDK ES</text:p>
          </table:table-cell>
          <table:table-cell table:formula="of:=SUM([.J6]/100)" office:value-type="float" office:value="0.0776" calcext:value-type="float">
            <text:p>0,0776</text:p>
          </table:table-cell>
          <table:table-cell office:value-type="float" office:value="7.76" calcext:value-type="float">
            <text:p>7,76</text:p>
          </table:table-cell>
          <table:table-cell office:value-type="string" calcext:value-type="string">
            <text:p>JONQUERAS</text:p>
          </table:table-cell>
          <table:table-cell office:value-type="string" calcext:value-type="string">
            <text:p>https://www.drinkslowcost.com/fr/articles/10363/vodka-poliakov-37-5-1-l</text:p>
          </table:table-cell>
        </table:table-row>
        <table:table-row table:style-name="ro1">
          <table:table-cell table:style-name="ce6" office:value-type="string" calcext:value-type="string">
            <text:p>GOYA-GOYA</text:p>
          </table:table-cell>
          <table:table-cell table:formula="of:=SUM([.I4]+10*[.I5]+5*[.I13]+35*[.I21])" office:value-type="float" office:value="2.9865" calcext:value-type="float">
            <text:p>2,9865</text:p>
          </table:table-cell>
          <table:table-cell table:formula="of:=SUM([.I4]+10*[.I6]+5*[.I13]+35*[.I21])" office:value-type="float" office:value="2.1935" calcext:value-type="float">
            <text:p>2,1935</text:p>
          </table:table-cell>
          <table:table-cell table:formula="of:=SUM([.B7]*2.5)" office:value-type="float" office:value="7.46625" calcext:value-type="float">
            <text:p>7,46625</text:p>
          </table:table-cell>
          <table:table-cell table:formula="of:=SUM([.C7]*3)" office:value-type="float" office:value="6.5805" calcext:value-type="float">
            <text:p>6,5805</text:p>
          </table:table-cell>
          <table:table-cell table:formula="of:=SUM([.D7]-[.B7])" office:value-type="float" office:value="4.47975" calcext:value-type="float">
            <text:p>4,47975</text:p>
          </table:table-cell>
          <table:table-cell table:formula="of:=SUM([.E7]-[.C7])" office:value-type="float" office:value="4.387" calcext:value-type="float">
            <text:p>4,387</text:p>
          </table:table-cell>
          <table:table-cell table:style-name="ce26" office:value-type="string" calcext:value-type="string">
            <text:p>CRAZY TIGER</text:p>
          </table:table-cell>
          <table:table-cell table:formula="of:=SUM([.J7]/100)" office:value-type="float" office:value="0.0245" calcext:value-type="float">
            <text:p>0,024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7" office:value-type="string" calcext:value-type="string">
            <text:p>HOLLOW-PURPLE</text:p>
          </table:table-cell>
          <table:table-cell table:formula="of:=SUM([.I4]+10*[.I5]+5*[.I17]+30*[.I25]+5*[.I14])" office:value-type="float" office:value="2.6205" calcext:value-type="float">
            <text:p>2,6205</text:p>
          </table:table-cell>
          <table:table-cell table:formula="of:=SUM([.I4]+10*[.I6]+5*[.I17]+30*[.I25]+5*[.I14])" office:value-type="float" office:value="1.8275" calcext:value-type="float">
            <text:p>1,8275</text:p>
          </table:table-cell>
          <table:table-cell table:formula="of:=SUM([.B8]*2.5)" office:value-type="float" office:value="6.55125" calcext:value-type="float">
            <text:p>6,55125</text:p>
          </table:table-cell>
          <table:table-cell table:formula="of:=SUM([.C8]*3)" office:value-type="float" office:value="5.4825" calcext:value-type="float">
            <text:p>5,4825</text:p>
          </table:table-cell>
          <table:table-cell table:formula="of:=SUM([.D8]-[.B8])" office:value-type="float" office:value="3.93075" calcext:value-type="float">
            <text:p>3,93075</text:p>
          </table:table-cell>
          <table:table-cell table:formula="of:=SUM([.E8]-[.C8])" office:value-type="float" office:value="3.655" calcext:value-type="float">
            <text:p>3,655</text:p>
          </table:table-cell>
          <table:table-cell table:style-name="ce27" office:value-type="string" calcext:value-type="string">
            <text:p>CRAZY TIGER CERISE</text:p>
          </table:table-cell>
          <table:table-cell table:formula="of:=SUM([.J8]/100)" office:value-type="float" office:value="0.0245" calcext:value-type="float">
            <text:p>0,024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8" office:value-type="string" calcext:value-type="string">
            <text:p>VDK-REDBULL</text:p>
          </table:table-cell>
          <table:table-cell table:formula="of:=SUM([.I4]+10*[.I5]+40*[.I7])" office:value-type="float" office:value="3.099" calcext:value-type="float">
            <text:p>3,099</text:p>
          </table:table-cell>
          <table:table-cell table:formula="of:=SUM([.I4]+10*[.I6]+40*[.I7])" office:value-type="float" office:value="2.306" calcext:value-type="float">
            <text:p>2,306</text:p>
          </table:table-cell>
          <table:table-cell table:formula="of:=SUM([.B9]*2.5)" office:value-type="float" office:value="7.7475" calcext:value-type="float">
            <text:p>7,7475</text:p>
          </table:table-cell>
          <table:table-cell table:formula="of:=SUM([.C9]*3)" office:value-type="float" office:value="6.918" calcext:value-type="float">
            <text:p>6,918</text:p>
          </table:table-cell>
          <table:table-cell table:formula="of:=SUM([.D9]-[.B9])" office:value-type="float" office:value="4.6485" calcext:value-type="float">
            <text:p>4,6485</text:p>
          </table:table-cell>
          <table:table-cell table:formula="of:=SUM([.E9]-[.C9])" office:value-type="float" office:value="4.612" calcext:value-type="float">
            <text:p>4,612</text:p>
          </table:table-cell>
          <table:table-cell table:style-name="ce28" office:value-type="string" calcext:value-type="string">
            <text:p>POWERADE BLEU</text:p>
          </table:table-cell>
          <table:table-cell table:formula="of:=SUM([.J9]/100)" office:value-type="float" office:value="0.0218" calcext:value-type="float">
            <text:p>0,0218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9" office:value-type="string" calcext:value-type="string">
            <text:p>MOJITO-VDK</text:p>
          </table:table-cell>
          <table:table-cell table:formula="of:=SUM([.I4]+10*[.I5]+5*[.I18]+5*[.I14]+30*[.I25])" office:value-type="float" office:value="2.518" calcext:value-type="float">
            <text:p>2,518</text:p>
          </table:table-cell>
          <table:table-cell table:formula="of:=SUM([.I4]+10*[.I6]+5*[.I18]+5*[.I14]+30*[.I25])" office:value-type="float" office:value="1.725" calcext:value-type="float">
            <text:p>1,725</text:p>
          </table:table-cell>
          <table:table-cell table:formula="of:=SUM([.B10]*2.5)" office:value-type="float" office:value="6.295" calcext:value-type="float">
            <text:p>6,295</text:p>
          </table:table-cell>
          <table:table-cell table:formula="of:=SUM([.C10]*3)" office:value-type="float" office:value="5.175" calcext:value-type="float">
            <text:p>5,175</text:p>
          </table:table-cell>
          <table:table-cell table:formula="of:=SUM([.D10]-[.B10])" office:value-type="float" office:value="3.777" calcext:value-type="float">
            <text:p>3,777</text:p>
          </table:table-cell>
          <table:table-cell table:formula="of:=SUM([.E10]-[.C10])" office:value-type="float" office:value="3.45" calcext:value-type="float">
            <text:p>3,45</text:p>
          </table:table-cell>
          <table:table-cell table:style-name="ce29" office:value-type="string" calcext:value-type="string">
            <text:p>POWERADE JAUNE</text:p>
          </table:table-cell>
          <table:table-cell table:formula="of:=SUM([.J10]/100)" office:value-type="float" office:value="0.021" calcext:value-type="float">
            <text:p>0,02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10" office:value-type="string" calcext:value-type="string">
            <text:p>CASSIS-FUSION</text:p>
          </table:table-cell>
          <table:table-cell table:formula="of:=SUM([.I4]+10*[.I5]+5*[.I15]+15*[.I9]+20*[.I25])" office:value-type="float" office:value="2.7215" calcext:value-type="float">
            <text:p>2,7215</text:p>
          </table:table-cell>
          <table:table-cell table:formula="of:=SUM([.I4]+10*[.I6]+5*[.I15]+15*[.I9]+20*[.I25])" office:value-type="float" office:value="1.9285" calcext:value-type="float">
            <text:p>1,9285</text:p>
          </table:table-cell>
          <table:table-cell table:formula="of:=SUM([.B11]*2.5)" office:value-type="float" office:value="6.80375" calcext:value-type="float">
            <text:p>6,80375</text:p>
          </table:table-cell>
          <table:table-cell table:formula="of:=SUM([.C11]*3)" office:value-type="float" office:value="5.7855" calcext:value-type="float">
            <text:p>5,7855</text:p>
          </table:table-cell>
          <table:table-cell table:formula="of:=SUM([.D11]-[.B11])" office:value-type="float" office:value="4.08225" calcext:value-type="float">
            <text:p>4,08225</text:p>
          </table:table-cell>
          <table:table-cell table:formula="of:=SUM([.E11]-[.C11])" office:value-type="float" office:value="3.857" calcext:value-type="float">
            <text:p>3,857</text:p>
          </table:table-cell>
          <table:table-cell table:style-name="ce30" office:value-type="string" calcext:value-type="string">
            <text:p>POWERADE ROUGE</text:p>
          </table:table-cell>
          <table:table-cell table:style-name="ce44"/>
          <table:table-cell table:style-name="ce46"/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11" office:value-type="string" calcext:value-type="string">
            <text:p>KIWI-BANANE</text:p>
          </table:table-cell>
          <table:table-cell table:formula="of:=SUM([.I4]+10*[.I5]+5*[.I16]+35*[.I23])" office:value-type="float" office:value="2.6765" calcext:value-type="float">
            <text:p>2,6765</text:p>
          </table:table-cell>
          <table:table-cell table:formula="of:=SUM([.I4]+10*[.I6]+5*[.I16]+35*[.I23])" office:value-type="float" office:value="1.8835" calcext:value-type="float">
            <text:p>1,8835</text:p>
          </table:table-cell>
          <table:table-cell table:formula="of:=SUM([.B12]*2.5)" office:value-type="float" office:value="6.69125" calcext:value-type="float">
            <text:p>6,69125</text:p>
          </table:table-cell>
          <table:table-cell table:formula="of:=SUM([.C12]*3)" office:value-type="float" office:value="5.6505" calcext:value-type="float">
            <text:p>5,6505</text:p>
          </table:table-cell>
          <table:table-cell table:formula="of:=SUM([.D12]-[.B12])" office:value-type="float" office:value="4.01475" calcext:value-type="float">
            <text:p>4,01475</text:p>
          </table:table-cell>
          <table:table-cell table:formula="of:=SUM([.E12]-[.C12])" office:value-type="float" office:value="3.767" calcext:value-type="float">
            <text:p>3,767</text:p>
          </table:table-cell>
          <table:table-cell table:style-name="ce31" office:value-type="string" calcext:value-type="string">
            <text:p>SIROP GRENADINE</text:p>
          </table:table-cell>
          <table:table-cell table:formula="of:=SUM([.J12]/100)" office:value-type="float" office:value="0.0175" calcext:value-type="float">
            <text:p>0,0175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12" office:value-type="string" calcext:value-type="string">
            <text:p>HOT-MAGMA</text:p>
          </table:table-cell>
          <table:table-cell table:formula="of:=SUM([.I4]+10*[.I5]+20*[.I22]+20*[.I19])" office:value-type="float" office:value="2.767" calcext:value-type="float">
            <text:p>2,767</text:p>
          </table:table-cell>
          <table:table-cell table:formula="of:=SUM([.I4]+10*[.I6]+20*[.I22]+20*[.I19])" office:value-type="float" office:value="1.974" calcext:value-type="float">
            <text:p>1,974</text:p>
          </table:table-cell>
          <table:table-cell table:formula="of:=SUM([.B13]*2.5)" office:value-type="float" office:value="6.9175" calcext:value-type="float">
            <text:p>6,9175</text:p>
          </table:table-cell>
          <table:table-cell table:formula="of:=SUM([.C13]*3)" office:value-type="float" office:value="5.922" calcext:value-type="float">
            <text:p>5,922</text:p>
          </table:table-cell>
          <table:table-cell table:formula="of:=SUM([.D13]-[.B13])" office:value-type="float" office:value="4.1505" calcext:value-type="float">
            <text:p>4,1505</text:p>
          </table:table-cell>
          <table:table-cell table:formula="of:=SUM([.E13]-[.C13])" office:value-type="float" office:value="3.948" calcext:value-type="float">
            <text:p>3,948</text:p>
          </table:table-cell>
          <table:table-cell table:style-name="ce32" office:value-type="string" calcext:value-type="string">
            <text:p>SIROP FRAMBOISE</text:p>
          </table:table-cell>
          <table:table-cell table:formula="of:=SUM([.J13]/100)" office:value-type="float" office:value="0.023" calcext:value-type="float">
            <text:p>0,023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LIDL</text:p>
          </table:table-cell>
          <table:table-cell/>
        </table:table-row>
        <table:table-row table:style-name="ro1">
          <table:table-cell table:style-name="ce13" office:value-type="string" calcext:value-type="string">
            <text:p>VDK-POMME</text:p>
          </table:table-cell>
          <table:table-cell table:formula="of:=SUM([.I4]+10*[.I5]+40*[.I23])" office:value-type="float" office:value="2.539" calcext:value-type="float">
            <text:p>2,539</text:p>
          </table:table-cell>
          <table:table-cell table:formula="of:=SUM([.I4]+10*[.I6]+40*[.I23])" office:value-type="float" office:value="1.746" calcext:value-type="float">
            <text:p>1,746</text:p>
          </table:table-cell>
          <table:table-cell table:formula="of:=SUM([.B14]*2.5)" office:value-type="float" office:value="6.3475" calcext:value-type="float">
            <text:p>6,3475</text:p>
          </table:table-cell>
          <table:table-cell table:formula="of:=SUM([.C14]*3)" office:value-type="float" office:value="5.238" calcext:value-type="float">
            <text:p>5,238</text:p>
          </table:table-cell>
          <table:table-cell table:formula="of:=SUM([.D14]-[.B14])" office:value-type="float" office:value="3.8085" calcext:value-type="float">
            <text:p>3,8085</text:p>
          </table:table-cell>
          <table:table-cell table:formula="of:=SUM([.E14]-[.C14])" office:value-type="float" office:value="3.492" calcext:value-type="float">
            <text:p>3,492</text:p>
          </table:table-cell>
          <table:table-cell table:style-name="ce33" office:value-type="string" calcext:value-type="string">
            <text:p>SIROP CITRON</text:p>
          </table:table-cell>
          <table:table-cell table:formula="of:=SUM([.J14]/100)" office:value-type="float" office:value="0.0245" calcext:value-type="float">
            <text:p>0,024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style-name="ce14" office:value-type="string" calcext:value-type="string">
            <text:p>VDK-CHERRY</text:p>
          </table:table-cell>
          <table:table-cell table:formula="of:=SUM([.I4]+10*[.I5]+40*[.I8])" office:value-type="float" office:value="3.099" calcext:value-type="float">
            <text:p>3,099</text:p>
          </table:table-cell>
          <table:table-cell table:formula="of:=SUM([.I4]+10*[.I6]+40*[.I8])" office:value-type="float" office:value="2.306" calcext:value-type="float">
            <text:p>2,306</text:p>
          </table:table-cell>
          <table:table-cell table:formula="of:=SUM([.B15]*2.5)" office:value-type="float" office:value="7.7475" calcext:value-type="float">
            <text:p>7,7475</text:p>
          </table:table-cell>
          <table:table-cell table:formula="of:=SUM([.C15]*3)" office:value-type="float" office:value="6.918" calcext:value-type="float">
            <text:p>6,918</text:p>
          </table:table-cell>
          <table:table-cell table:formula="of:=SUM([.D15]-[.B15])" office:value-type="float" office:value="4.6485" calcext:value-type="float">
            <text:p>4,6485</text:p>
          </table:table-cell>
          <table:table-cell table:formula="of:=SUM([.E15]-[.C15])" office:value-type="float" office:value="4.612" calcext:value-type="float">
            <text:p>4,612</text:p>
          </table:table-cell>
          <table:table-cell table:style-name="ce34" office:value-type="string" calcext:value-type="string">
            <text:p>SIROP CASSIS</text:p>
          </table:table-cell>
          <table:table-cell table:formula="of:=SUM([.J15]/100)" office:value-type="float" office:value="0.0359" calcext:value-type="float">
            <text:p>0,0359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35" office:value-type="string" calcext:value-type="string">
            <text:p>SIROP KIWI-BANANE</text:p>
          </table:table-cell>
          <table:table-cell table:formula="of:=SUM([.J16]/100)" office:value-type="float" office:value="0.038" calcext:value-type="float">
            <text:p>0,038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string" calcext:value-type="string">
            <text:p>SIROP VIOLETTE</text:p>
          </table:table-cell>
          <table:table-cell table:formula="of:=SUM([.J17]/100)" office:value-type="float" office:value="0.047" calcext:value-type="float">
            <text:p>0,047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string" calcext:value-type="string">
            <text:p>SIROP MENTHE</text:p>
          </table:table-cell>
          <table:table-cell table:formula="of:=SUM([.J18]/100)" office:value-type="float" office:value="0.0265" calcext:value-type="float">
            <text:p>0,0265</text:p>
          </table:table-cell>
          <table:table-cell office:value-type="float" office:value="2.65" calcext:value-type="float">
            <text:p>2,6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37" office:value-type="string" calcext:value-type="string">
            <text:p>JUS ORANGE</text:p>
          </table:table-cell>
          <table:table-cell table:formula="of:=SUM([.J19]/100)" office:value-type="float" office:value="0.0155" calcext:value-type="float">
            <text:p>0,0155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38" office:value-type="string" calcext:value-type="string">
            <text:p>JUS CRAMBERRY</text:p>
          </table:table-cell>
          <table:table-cell table:formula="of:=SUM([.J20]/100)" office:value-type="float" office:value="0.0179" calcext:value-type="float">
            <text:p>0,0179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30" office:value-type="string" calcext:value-type="string">
            <text:p>JUS GOYAVE</text:p>
          </table:table-cell>
          <table:table-cell table:formula="of:=SUM([.J21]/100)" office:value-type="float" office:value="0.0215" calcext:value-type="float">
            <text:p>0,0215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39" office:value-type="string" calcext:value-type="string">
            <text:p>JUS ANANAS</text:p>
          </table:table-cell>
          <table:table-cell table:formula="of:=SUM([.J22]/100)" office:value-type="float" office:value="0.0169" calcext:value-type="float">
            <text:p>0,0169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40" office:value-type="string" calcext:value-type="string">
            <text:p>JUS POMME</text:p>
          </table:table-cell>
          <table:table-cell table:formula="of:=SUM([.J23]/100)" office:value-type="float" office:value="0.0105" calcext:value-type="float">
            <text:p>0,010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41" office:value-type="string" calcext:value-type="string">
            <text:p>JUS MULTIFRUITS</text:p>
          </table:table-cell>
          <table:table-cell table:formula="of:=SUM([.J24]/100)" office:value-type="float" office:value="0.014" calcext:value-type="float">
            <text:p>0,014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>
          <table:table-cell table:number-columns-repeated="7"/>
          <table:table-cell table:style-name="ce42" office:value-type="string" calcext:value-type="string">
            <text:p>LIMONADE</text:p>
          </table:table-cell>
          <table:table-cell table:formula="of:=SUM([.J25]/100)" office:value-type="float" office:value="0.0048" calcext:value-type="float">
            <text:p>0,0048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ARREFOUR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5:43:48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5:46:04.478000000</meta:creation-date>
    <dc:date>2025-02-17T15:51:31.402000000</dc:date>
    <meta:editing-duration>PT25M22S</meta:editing-duration>
    <meta:editing-cycles>3</meta:editing-cycles>
    <meta:generator>LibreOffice/24.8.4.2$Windows_X86_64 LibreOffice_project/bb3cfa12c7b1bf994ecc5649a80400d06cd71002</meta:generator>
    <meta:document-statistic meta:table-count="1" meta:cell-count="183" meta:object-count="0"/>
  </office:meta>
</office:document-meta>
</file>